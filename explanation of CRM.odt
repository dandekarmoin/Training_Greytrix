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RM (Customer Relationship Management) – Introduction</text:h>
      <text:h text:style-name="Heading_20_2" text:outline-level="2">What is CRM?</text:h>
      <text:p text:style-name="Text_20_body">CRM (Customer Relationship Management) is a software platform that helps businesses manage their <text:span text:style-name="Strong_20_Emphasis">Sales, Marketing, and Customer Support</text:span> activities in one place.</text:p>
      <text:p text:style-name="Text_20_body">Instead of storing customer information in different files or spreadsheets, CRM stores all business-related data in a <text:span text:style-name="Strong_20_Emphasis">centralized database</text:span>. This allows teams to access the same information, work together efficiently, and achieve business goals more effectively.</text:p>
      <text:p text:style-name="Horizontal_20_Line"/>
      <text:h text:style-name="Heading_20_2" text:outline-level="2">Why is CRM Needed?</text:h>
      <text:p text:style-name="Text_20_body">As businesses grow, managing customers, leads, and sales activities manually becomes difficult. CRM helps by:</text:p>
      <text:list xml:id="list4822309572188986217" text:style-name="L1">
        <text:list-item>
          <text:p text:style-name="P1">Organizing customer information in one place.</text:p>
        </text:list-item>
        <text:list-item>
          <text:p text:style-name="P1">Tracking interactions with customers.</text:p>
        </text:list-item>
        <text:list-item>
          <text:p text:style-name="P1">Improving communication between Sales, Marketing, and Support teams.</text:p>
        </text:list-item>
        <text:list-item>
          <text:p text:style-name="P1">Monitoring lead status, sales pipelines, and campaign performance.</text:p>
        </text:list-item>
        <text:list-item>
          <text:p text:style-name="P1">Increasing productivity through automation.</text:p>
        </text:list-item>
      </text:list>
      <text:p text:style-name="Text_20_body">CRM helps businesses operate more efficiently and improve profitability.</text:p>
      <text:p text:style-name="Horizontal_20_Line"/>
      <text:h text:style-name="Heading_20_2" text:outline-level="2">What Does CRM Do?</text:h>
      <text:p text:style-name="Text_20_body">CRM helps businesses build and maintain relationships with existing customers while identifying future business opportunities.</text:p>
      <text:p text:style-name="Text_20_body">Key functions of CRM include:</text:p>
      <text:list xml:id="list1773854607826001021" text:style-name="L2">
        <text:list-item>
          <text:p text:style-name="P2">Managing customer interactions.</text:p>
        </text:list-item>
        <text:list-item>
          <text:p text:style-name="P2">Tracking leads and opportunities.</text:p>
        </text:list-item>
        <text:list-item>
          <text:p text:style-name="P2">Automating repetitive tasks.</text:p>
        </text:list-item>
        <text:list-item>
          <text:p text:style-name="P2">Monitoring sales activities.</text:p>
        </text:list-item>
        <text:list-item>
          <text:p text:style-name="P2">Supporting marketing campaigns.</text:p>
        </text:list-item>
        <text:list-item>
          <text:p text:style-name="P2">Improving customer service.</text:p>
        </text:list-item>
      </text:list>
      <text:p text:style-name="Text_20_body">By using technology, CRM helps businesses grow in a structured and efficient manner.</text:p>
      <text:p text:style-name="Horizontal_20_Line"/>
      <text:h text:style-name="Heading_20_2" text:outline-level="2"><text:soft-page-break/>Benefits of CRM</text:h>
      <text:h text:style-name="Heading_20_3" text:outline-level="3">1. Improved Customer Revenue</text:h>
      <text:p text:style-name="Text_20_body">CRM helps businesses understand customer needs and offer relevant products or services, leading to increased sales and revenue.</text:p>
      <text:h text:style-name="Heading_20_3" text:outline-level="3">2. Better Customer Interaction</text:h>
      <text:p text:style-name="Text_20_body">Businesses can provide personalized experiences, rewards, and timely communication, improving customer satisfaction.</text:p>
      <text:h text:style-name="Heading_20_3" text:outline-level="3">3. Direct Selling and Cross-Selling</text:h>
      <text:list xml:id="list4854809262699076212" text:style-name="L3">
        <text:list-item>
          <text:p text:style-name="P3"><text:span text:style-name="Strong_20_Emphasis">Direct Selling:</text:span> Selling products directly to customers.</text:p>
        </text:list-item>
        <text:list-item>
          <text:p text:style-name="P3"><text:span text:style-name="Strong_20_Emphasis">Cross-Selling:</text:span> Offering related or complementary products to existing customers.</text:p>
        </text:list-item>
      </text:list>
      <text:h text:style-name="Heading_20_3" text:outline-level="3">4. Actionable Data</text:h>
      <text:p text:style-name="Text_20_body">CRM stores customer history and business activities, helping management make informed decisions.</text:p>
      <text:h text:style-name="Heading_20_3" text:outline-level="3">5. Data Security</text:h>
      <text:p text:style-name="Text_20_body">Business information is stored securely and can only be accessed by authorized users within the organization.</text:p>
      <text:p text:style-name="Horizontal_20_Line"/>
      <text:h text:style-name="Heading_20_1" text:outline-level="1">How CRM Works</text:h>
      <text:p text:style-name="Text_20_body">CRM follows a structured process:</text:p>
      <text:list xml:id="list7322795349890909811" text:style-name="L4">
        <text:list-item>
          <text:p text:style-name="P4">Marketing campaigns are conducted through social media, advertisements, events, seminars, magazines, etc.</text:p>
        </text:list-item>
        <text:list-item>
          <text:p text:style-name="P4">Leads are generated from these campaigns.</text:p>
        </text:list-item>
        <text:list-item>
          <text:p text:style-name="P4">Leads are assigned to sales representatives.</text:p>
        </text:list-item>
        <text:list-item>
          <text:p text:style-name="P4">Follow-ups are conducted through calls, emails, or meetings.</text:p>
        </text:list-item>
        <text:list-item>
          <text:p text:style-name="P4">Leads are evaluated and classified as:</text:p>
          <text:list>
            <text:list-item>
              <text:p text:style-name="P4">Hot Leads</text:p>
            </text:list-item>
            <text:list-item>
              <text:p text:style-name="P4">Warm Leads</text:p>
            </text:list-item>
            <text:list-item>
              <text:p text:style-name="P4">Cold Leads</text:p>
            </text:list-item>
          </text:list>
        </text:list-item>
        <text:list-item>
          <text:p text:style-name="P4">Qualified leads become opportunities.</text:p>
        </text:list-item>
        <text:list-item>
          <text:p text:style-name="P4">Quotations are sent to interested customers.</text:p>
        </text:list-item>
        <text:list-item>
          <text:p text:style-name="P4">If the customer accepts the proposal, the deal is marked as <text:span text:style-name="Strong_20_Emphasis">Won</text:span>.</text:p>
        </text:list-item>
        <text:list-item>
          <text:p text:style-name="P4">If the customer rejects the proposal, the deal is marked as <text:span text:style-name="Strong_20_Emphasis">Lost</text:span>.</text:p>
        </text:list-item>
      </text:list>
      <text:p text:style-name="Horizontal_20_Line"/>
      <text:h text:style-name="Heading_20_2" text:outline-level="2"><text:soft-page-break/>CRM Example</text:h>
      <text:h text:style-name="Heading_20_3" text:outline-level="3">Amazon</text:h>
      <text:p text:style-name="Text_20_body">Amazon uses customer data and purchase history to understand customer preferences. Based on this analysis, Amazon provides:</text:p>
      <text:list xml:id="list8870134687944790535" text:style-name="L5">
        <text:list-item>
          <text:p text:style-name="P5">Personalized recommendations</text:p>
        </text:list-item>
        <text:list-item>
          <text:p text:style-name="P5">Special discounts</text:p>
        </text:list-item>
        <text:list-item>
          <text:p text:style-name="P5">Reward programs</text:p>
        </text:list-item>
        <text:list-item>
          <text:p text:style-name="P5">Targeted offers</text:p>
        </text:list-item>
      </text:list>
      <text:p text:style-name="Text_20_body">This improves customer satisfaction and increases sales.</text:p>
      <text:p text:style-name="Horizontal_20_Line"/>
      <text:h text:style-name="Heading_20_1" text:outline-level="1">Company Information in CRM</text:h>
      <text:p text:style-name="Text_20_body">CRM stores various types of information related to a company.</text:p>
      <text:h text:style-name="Heading_20_2" text:outline-level="2">Documents</text:h>
      <text:p text:style-name="Text_20_body">Official business documents such as contracts, agreements, quotations, proposals, and project documentation.</text:p>
      <text:h text:style-name="Heading_20_2" text:outline-level="2">Quick Notes</text:h>
      <text:p text:style-name="Text_20_body">Short notes used for quick reference and important reminders.</text:p>
      <text:h text:style-name="Heading_20_2" text:outline-level="2">Communication</text:h>
      <text:p text:style-name="Text_20_body">Records of customer interactions, including:</text:p>
      <text:list xml:id="list521677358081086087" text:style-name="L6">
        <text:list-item>
          <text:p text:style-name="P6">Emails</text:p>
        </text:list-item>
        <text:list-item>
          <text:p text:style-name="P6">Calls</text:p>
        </text:list-item>
        <text:list-item>
          <text:p text:style-name="P6">Appointments</text:p>
        </text:list-item>
        <text:list-item>
          <text:p text:style-name="P6">Meetings</text:p>
        </text:list-item>
        <text:list-item>
          <text:p text:style-name="P6">Tasks</text:p>
        </text:list-item>
      </text:list>
      <text:h text:style-name="Heading_20_2" text:outline-level="2">Opportunities</text:h>
      <text:p text:style-name="Text_20_body">Potential business deals that may generate revenue for the organization.</text:p>
      <text:h text:style-name="Heading_20_2" text:outline-level="2">Cases</text:h>
      <text:p text:style-name="Text_20_body">Customer issues, support requests, or business scenarios that require attention.</text:p>
      <text:h text:style-name="Heading_20_2" text:outline-level="2"><text:soft-page-break/>People &amp; Addresses</text:h>
      <text:p text:style-name="Text_20_body">Contact details of customers, prospects, and business partners.</text:p>
      <text:h text:style-name="Heading_20_2" text:outline-level="2">Phone &amp; Email Records</text:h>
      <text:p text:style-name="Text_20_body">Internal and external contact information used for communication with employees and customers.</text:p>
      <text:p text:style-name="Horizontal_20_Line"/>
      <text:h text:style-name="Heading_20_1" text:outline-level="1">Leads and Opportunities</text:h>
      <text:h text:style-name="Heading_20_2" text:outline-level="2">Lead Life Cycle</text:h>
      <text:p text:style-name="Text_20_body">A Lead Life Cycle describes the journey of a lead from initial contact to becoming a customer.</text:p>
      <text:h text:style-name="Heading_20_3" text:outline-level="3">Steps:</text:h>
      <text:list xml:id="list5595191816420728739" text:style-name="L7">
        <text:list-item>
          <text:p text:style-name="P7">Run a marketing campaign.</text:p>
        </text:list-item>
        <text:list-item>
          <text:p text:style-name="P7">Generate leads from the campaign.</text:p>
        </text:list-item>
        <text:list-item>
          <text:p text:style-name="P7">Assign leads to sales representatives.</text:p>
        </text:list-item>
        <text:list-item>
          <text:p text:style-name="P7">Follow up with leads.</text:p>
        </text:list-item>
        <text:list-item>
          <text:p text:style-name="P7">Qualify interested leads.</text:p>
        </text:list-item>
        <text:list-item>
          <text:p text:style-name="P7">Categorize leads as:</text:p>
          <text:list>
            <text:list-item>
              <text:p text:style-name="P7">Hot Leads</text:p>
            </text:list-item>
            <text:list-item>
              <text:p text:style-name="P7">Warm Leads</text:p>
            </text:list-item>
            <text:list-item>
              <text:p text:style-name="P7">Cold Leads</text:p>
            </text:list-item>
          </text:list>
        </text:list-item>
        <text:list-item>
          <text:p text:style-name="P7">Continue communication through phone, email, or chat.</text:p>
        </text:list-item>
        <text:list-item>
          <text:p text:style-name="P7">Convert qualified leads into opportunities.</text:p>
        </text:list-item>
        <text:list-item>
          <text:p text:style-name="P7">Close the deal:</text:p>
          <text:list>
            <text:list-item>
              <text:p text:style-name="P7">Deal Won</text:p>
            </text:list-item>
            <text:list-item>
              <text:p text:style-name="P7">Deal Lost</text:p>
            </text:list-item>
          </text:list>
        </text:list-item>
      </text:list>
      <text:p text:style-name="Horizontal_20_Line"/>
      <text:h text:style-name="Heading_20_2" text:outline-level="2">Lead</text:h>
      <text:p text:style-name="Text_20_body">A Lead is a person, company, or business contact whose information has been collected through marketing campaigns, events, seminars, websites, or referrals.</text:p>
      <text:p text:style-name="Text_20_body">At this stage, it is unknown whether the lead is genuinely interested in the product or service.</text:p>
      <text:h text:style-name="Heading_20_3" text:outline-level="3">Example:</text:h>
      <text:p text:style-name="Text_20_body">A visitor fills out a contact form on a company's website.</text:p>
      <text:p text:style-name="Horizontal_20_Line"/>
      <text:h text:style-name="Heading_20_2" text:outline-level="2"><text:soft-page-break/>Opportunity</text:h>
      <text:p text:style-name="Text_20_body">An Opportunity is a qualified lead that has shown genuine interest in the company's product or service and has a higher chance of becoming a customer.</text:p>
      <text:h text:style-name="Heading_20_3" text:outline-level="3">Example:</text:h>
      <text:p text:style-name="Text_20_body">A lead requests a product demonstration and discusses pricing with the sales team.</text:p>
      <text:p text:style-name="Horizontal_20_Line"/>
      <text:h text:style-name="Heading_20_1" text:outline-level="1">Quotes and Orders</text:h>
      <text:h text:style-name="Heading_20_2" text:outline-level="2">Quote (Quotation)</text:h>
      <text:p text:style-name="Text_20_body">A Quote is a formal document provided by the vendor to the customer after understanding the customer's requirements.</text:p>
      <text:p text:style-name="Text_20_body">It contains:</text:p>
      <text:list xml:id="list3718705586677086881" text:style-name="L8">
        <text:list-item>
          <text:p text:style-name="P8">Product or service details</text:p>
        </text:list-item>
        <text:list-item>
          <text:p text:style-name="P8">Pricing information</text:p>
        </text:list-item>
        <text:list-item>
          <text:p text:style-name="P8">Terms and conditions</text:p>
        </text:list-item>
        <text:list-item>
          <text:p text:style-name="P8">Delivery timeline</text:p>
        </text:list-item>
        <text:list-item>
          <text:p text:style-name="P8">Quote ID</text:p>
        </text:list-item>
      </text:list>
      <text:p text:style-name="Text_20_body">A quotation serves as a formal offer from the vendor.</text:p>
      <text:p text:style-name="Horizontal_20_Line"/>
      <text:h text:style-name="Heading_20_2" text:outline-level="2">Order</text:h>
      <text:p text:style-name="Text_20_body">When the customer accepts the quotation, they place an order with the vendor.</text:p>
      <text:h text:style-name="Heading_20_3" text:outline-level="3">Purchase Order (PO)</text:h>
      <text:p text:style-name="Text_20_body">A document issued by the customer requesting the vendor to supply products or services.</text:p>
      <text:h text:style-name="Heading_20_3" text:outline-level="3">Sales Order (SO)</text:h>
      <text:p text:style-name="Text_20_body">A document created by the vendor to process and fulfill the customer's order.</text:p>
      <text:h text:style-name="Heading_20_3" text:outline-level="3">Example</text:h>
      <text:p text:style-name="Text_20_body"><text:span text:style-name="Strong_20_Emphasis">Purchase Order (PO):</text:span><text:line-break/>A customer requests 40 laptops from a vendor.</text:p>
      <text:p text:style-name="Text_20_body"><text:span text:style-name="Strong_20_Emphasis">Sales Order (SO):</text:span><text:line-break/>The vendor creates an internal sales order and processes the delivery of the 40 laptops.</text:p>
      <text:p text:style-name="Horizontal_20_Line"/>
      <text:h text:style-name="Heading_20_1" text:outline-level="1"><text:soft-page-break/>Cases and Solutions</text:h>
      <text:h text:style-name="Heading_20_2" text:outline-level="2">Case</text:h>
      <text:p text:style-name="Text_20_body">A Case is a customer issue, complaint, query, or support request raised during product usage or service delivery.</text:p>
      <text:h text:style-name="Heading_20_3" text:outline-level="3">Example:</text:h>
      <text:p text:style-name="Text_20_body">A customer reports that a software application is not functioning properly.</text:p>
      <text:p text:style-name="Horizontal_20_Line"/>
      <text:h text:style-name="Heading_20_2" text:outline-level="2">Solution</text:h>
      <text:p text:style-name="Text_20_body">A Solution is the resolution provided to solve a customer's problem.</text:p>
      <text:p text:style-name="Text_20_body">Organizations often store solutions in a knowledge base so that similar issues can be resolved quickly in the future.</text:p>
      <text:h text:style-name="Heading_20_3" text:outline-level="3">Example:</text:h>
      <text:p text:style-name="Text_20_body">A technical support team identifies the cause of the software issue and provides a fix. The solution is documented for future referenc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6-08T09:27:24.57</meta:creation-date>
    <meta:document-statistic meta:table-count="0" meta:image-count="0" meta:object-count="0" meta:page-count="6" meta:paragraph-count="133" meta:word-count="928" meta:character-count="6104"/>
    <dc:date>2026-06-08T09:27:43.93</dc:date>
    <meta:editing-duration>PT20S</meta:editing-duration>
    <meta:editing-cycles>1</meta:editing-cycles>
    <meta:generator>OpenOffice/4.1.16$Win32 OpenOffice.org_project/4116m3$Build-9816</meta:generator>
  </office:meta>
</office:document-meta>
</file>