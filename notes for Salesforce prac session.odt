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ad to Customer Conversion</text:h>
      <text:h text:style-name="Heading_20_2" text:outline-level="2">Lead Pipeline</text:h>
      <text:list xml:id="list6769810530931624488" text:style-name="L1">
        <text:list-item>
          <text:p text:style-name="P3"><text:span text:style-name="Strong_20_Emphasis">New Lead</text:span> </text:p>
          <text:list>
            <text:list-item>
              <text:p text:style-name="P3">No contact made. </text:p>
            </text:list-item>
          </text:list>
        </text:list-item>
        <text:list-item>
          <text:p text:style-name="P3"><text:span text:style-name="Strong_20_Emphasis">Working Lead</text:span> </text:p>
          <text:list>
            <text:list-item>
              <text:p text:style-name="P3">Contact established and engagement started. </text:p>
            </text:list-item>
          </text:list>
        </text:list-item>
        <text:list-item>
          <text:p text:style-name="P3"><text:span text:style-name="Strong_20_Emphasis">Qualified Lead</text:span> </text:p>
          <text:list>
            <text:list-item>
              <text:p text:style-name="P3">Lead verified and meets qualification criteria. </text:p>
            </text:list-item>
          </text:list>
        </text:list-item>
        <text:list-item>
          <text:p text:style-name="P3"><text:span text:style-name="Strong_20_Emphasis">Unqualified Lead</text:span> </text:p>
          <text:list>
            <text:list-item>
              <text:p text:style-name="P1">Not a good fit or does not meet criteria. </text:p>
            </text:list-item>
          </text:list>
        </text:list-item>
      </text:list>
      <text:h text:style-name="Heading_20_3" text:outline-level="3">Lead Conversion</text:h>
      <text:p text:style-name="Text_20_body"><text:span text:style-name="Strong_20_Emphasis">Qualified Lead → Account + Contact + Opportunity</text:span></text:p>
      <text:p text:style-name="Horizontal_20_Line"/>
      <text:h text:style-name="Heading_20_2" text:outline-level="2">Opportunity (Sales) Pipeline</text:h>
      <text:list xml:id="list6156842917641229335" text:style-name="L2">
        <text:list-item>
          <text:p text:style-name="P4"><text:span text:style-name="Strong_20_Emphasis">Prospecting</text:span> </text:p>
          <text:list>
            <text:list-item>
              <text:p text:style-name="P4">Initial outreach and contact. </text:p>
            </text:list-item>
          </text:list>
        </text:list-item>
        <text:list-item>
          <text:p text:style-name="P4"><text:span text:style-name="Strong_20_Emphasis">Qualification</text:span> </text:p>
          <text:list>
            <text:list-item>
              <text:p text:style-name="P4">Verify prospect information and fit. </text:p>
            </text:list-item>
          </text:list>
        </text:list-item>
        <text:list-item>
          <text:p text:style-name="P4"><text:span text:style-name="Strong_20_Emphasis">Need Analysis</text:span> </text:p>
          <text:list>
            <text:list-item>
              <text:p text:style-name="P4">Understand requirements and pain points. </text:p>
            </text:list-item>
          </text:list>
        </text:list-item>
        <text:list-item>
          <text:p text:style-name="P4"><text:span text:style-name="Strong_20_Emphasis">Value Proposition</text:span> </text:p>
          <text:list>
            <text:list-item>
              <text:p text:style-name="P4">Present solution and business value. </text:p>
            </text:list-item>
          </text:list>
        </text:list-item>
        <text:list-item>
          <text:p text:style-name="P4"><text:span text:style-name="Strong_20_Emphasis">Perception Analysis</text:span> </text:p>
          <text:list>
            <text:list-item>
              <text:p text:style-name="P4">Assess how the prospect views your offering vs competitors. </text:p>
            </text:list-item>
          </text:list>
        </text:list-item>
        <text:list-item>
          <text:p text:style-name="P4"><text:span text:style-name="Strong_20_Emphasis">Decision Making</text:span> </text:p>
          <text:list>
            <text:list-item>
              <text:p text:style-name="P4">Handle approvals, negotiations, and final decision. </text:p>
            </text:list-item>
          </text:list>
        </text:list-item>
        <text:list-item>
          <text:p text:style-name="P4"><text:span text:style-name="Strong_20_Emphasis">Closed Won / Closed Lost</text:span> </text:p>
          <text:list>
            <text:list-item>
              <text:p text:style-name="P2">Customer acquired or opportunity lost. </text:p>
            </text:list-item>
          </text:list>
        </text:list-item>
      </text:list>
      <text:h text:style-name="Heading_20_3" text:outline-level="3">Flow</text:h>
      <text:p text:style-name="Text_20_body"><text:span text:style-name="Strong_20_Emphasis">New Lead → Working Lead → Qualified Lead → Convert → Account + Contact + Opportunity → Prospecting → Qualification → Need Analysis → Value Proposition → Perception Analysis → Decision Making → Closed Won/Los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8T17:02:03.27</meta:creation-date>
    <meta:document-statistic meta:table-count="0" meta:image-count="0" meta:object-count="0" meta:page-count="1" meta:paragraph-count="29" meta:word-count="162" meta:character-count="996"/>
    <dc:date>2026-06-08T17:02:32.14</dc:date>
    <meta:editing-duration>PT29S</meta:editing-duration>
    <meta:editing-cycles>1</meta:editing-cycles>
    <meta:generator>OpenOffice/4.1.16$Win32 OpenOffice.org_project/4116m3$Build-9816</meta:generator>
  </office:meta>
</office:document-meta>
</file>